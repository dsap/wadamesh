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or ESP32-S3 targets with 8MB flash (without AppFS)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2048" calcext:value-type="float">
            <text:p>2048</text:p>
          </table:table-cell>
          <table:table-cell/>
          <table:table-cell table:formula="of:=[.F6]*4096" office:value-type="float" office:value="8388608" calcext:value-type="float">
            <text:p>8388608</text:p>
          </table:table-cell>
          <table:table-cell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2039" calcext:value-type="float">
            <text:p>2039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10000," calcext:value-type="string">
            <text:p>0x21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2035" calcext:value-type="float">
            <text:p>2035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2]) &amp; &quot;,&quot;" office:value-type="string" office:string-value="0x410000," calcext:value-type="string">
            <text:p>0x410000,</text:p>
          </table:table-cell>
          <table:table-cell table:style-name="ce8" table:formula="of:=[.D22]*4 &amp; &quot;K,&quot;" office:value-type="string" office:string-value="4032K," calcext:value-type="string">
            <text:p>403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2033" calcext:value-type="float">
            <text:p>2033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2032" calcext:value-type="float">
            <text:p>2032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1520" calcext:value-type="float">
            <text:p>152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008" calcext:value-type="float">
            <text:p>1008</text:p>
          </table:table-cell>
          <table:table-cell table:formula="of:=[.G18]+([.D18]*4096)" office:value-type="float" office:value="2162688" calcext:value-type="float">
            <text:p>2162688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008" calcext:value-type="float">
            <text:p>1008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0" calcext:value-type="float">
            <text:p>0</text:p>
          </table:table-cell>
          <table:table-cell table:formula="of:=[.G20]+([.D20]*4096)" office:value-type="float" office:value="4259840" calcext:value-type="float">
            <text:p>4259840</text:p>
          </table:table-cell>
          <table:table-cell table:formula="of:=[.D22]*4096" office:value-type="float" office:value="4128768" calcext:value-type="float">
            <text:p>4128768</text:p>
          </table:table-cell>
          <table:table-cell table:formula="of:=[.H22]/1024" office:value-type="float" office:value="4032" calcext:value-type="float">
            <text:p>4032</text:p>
          </table:table-cell>
          <table:table-cell table:formula="of:=[.I22]/1024" office:value-type="float" office:value="3.9375" calcext:value-type="float">
            <text:p>3.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7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20:03:47.885612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4-03T00:18:50.020472464</dc:date>
    <meta:editing-duration>PT6H9M46S</meta:editing-duration>
    <meta:editing-cycles>53</meta:editing-cycles>
    <meta:generator>LibreOffice/26.2.1.2$Linux_X86_64 LibreOffice_project/620$Build-2</meta:generator>
    <meta:document-statistic meta:table-count="1" meta:cell-count="124" meta:object-count="0"/>
  </office:meta>
</office:document-meta>
</file>